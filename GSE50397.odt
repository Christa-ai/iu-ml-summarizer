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T25" style:parent-style-name="Absatz-Standardschriftart" style:family="text">
      <style:text-properties fo:font-weight="bold" style:font-weight-asian="bold" style:font-weight-complex="bold"/>
    </style:style>
    <style:style style:name="T26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7" style:parent-style-name="Absatz-Standardschriftart" style:family="text">
      <style:text-properties fo:font-weight="bold" style:font-weight-asian="bold" style:font-weight-complex="bold"/>
    </style:style>
    <style:style style:name="T28" style:parent-style-name="Absatz-Standardschriftart" style:family="text">
      <style:text-properties style:font-name="Arial" style:font-name-complex="Arial"/>
    </style:style>
    <style:style style:name="T29" style:parent-style-name="Absatz-Standardschriftart" style:family="text">
      <style:text-properties fo:font-weight="bold" style:font-weight-asian="bold" style:font-weight-complex="bold"/>
    </style:style>
    <style:style style:name="T30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Absatz-Standardschriftart" style:family="text">
      <style:text-properties fo:font-weight="bold" style:font-weight-asian="bold" style:font-weight-complex="bold"/>
    </style:style>
    <style:style style:name="P32" style:parent-style-name="Standard" style:list-style-name="LFO3" style:family="paragraph"/>
    <style:style style:name="T33" style:parent-style-name="Absatz-Standardschriftart" style:family="text">
      <style:text-properties fo:font-weight="bold" style:font-weight-asian="bold" style:font-weight-complex="bold"/>
    </style:style>
    <style:style style:name="P34" style:parent-style-name="Standard" style:list-style-name="LFO3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list-style-name="LFO3" style:family="paragraph"/>
  </office:automatic-styles>
  <office:body>
    <office:text text:use-soft-page-breaks="true">
      <text:p text:style-name="P1">GSE50397 – Detaillierte Beschreibung</text:p>
      <text:p text:style-name="Standard"><text:span text:style-name="T2">📌</text:span><text:span text:style-name="T3"><text:s/>Titel &amp; Ziel der Studie</text:span></text:p>
      <text:p text:style-name="Standard"><text:span text:style-name="T4">Global transcriptomic analysis of human pancreatic islets reveals novel genes influencing glucose metabolism</text:span><text:s/>→ Ziel: Gene identifizieren, die in<text:s/><text:span text:style-name="T5">menschlichen Pankreasinseln</text:span><text:s/>durch<text:s/><text:span text:style-name="T6">Glukosestoffwechsel / HbA1c</text:span><text:s/>reguliert werden.<text:s/></text:p>
      <text:p text:style-name="Standard"><text:span text:style-name="T7">👥</text:span><text:span text:style-name="T8"><text:s/>Kohorte &amp; Proben</text:span></text:p>
      <text:list text:style-name="LFO1" text:continue-numbering="true">
        <text:list-item>
          <text:p text:style-name="P9"><text:span text:style-name="T10">89 menschliche Pankreasinsel</text:span><text:span text:style-name="T11">‑Spender</text:span></text:p>
        </text:list-item>
        <text:list-item>
          <text:p text:style-name="P12">Unterschiedliche<text:s/><text:span text:style-name="T13">HbA1c</text:span><text:span text:style-name="T14">‑Level</text:span><text:s/>(kontinuierlich verteilt)</text:p>
        </text:list-item>
        <text:list-item>
          <text:p text:style-name="P15">Spender stammen aus dem<text:s/><text:span text:style-name="T16">Nordic Islet Transplantation Programme</text:span><text:s/>(Uppsala University)<text:s/></text:p>
        </text:list-item>
      </text:list>
      <text:p text:style-name="Standard"><text:span text:style-name="T17">🧪</text:span><text:span text:style-name="T18"><text:s/>Experimenteller Aufbau</text:span></text:p>
      <text:list text:style-name="LFO2" text:continue-numbering="true">
        <text:list-item>
          <text:p text:style-name="P19"><text:span text:style-name="T20">Expression profiling by array</text:span></text:p>
        </text:list-item>
        <text:list-item>
          <text:p text:style-name="P21">Plattform:<text:s/><text:span text:style-name="T22">GPL6244 – Affymetrix Human Gene 1.0 ST Array</text:span></text:p>
        </text:list-item>
        <text:list-item>
          <text:p text:style-name="P23">Standard‑Affymetrix‑Protokoll</text:p>
        </text:list-item>
        <text:list-item>
          <text:p text:style-name="P24">Rohdaten verfügbar als<text:s/><text:span text:style-name="T25">GSE50397_RAW.tar (360.9 MB)</text:span><text:s/></text:p>
        </text:list-item>
      </text:list>
      <text:p text:style-name="Standard"><text:span text:style-name="T26">📚</text:span><text:span text:style-name="T27"><text:s/>Publikationen</text:span></text:p>
      <text:p text:style-name="Standard">Der Datensatz ist mehrfach publiziert, u.<text:span text:style-name="T28"> </text:span>a. in der Studie:<text:s/><text:span text:style-name="T29">„TCF7L2 is a master regulator of insulin production and processing“</text:span><text:s/>(PubMed 25015099).<text:s/></text:p>
      <text:p text:style-name="Standard">Weitere zugehörige Publikationen laut GEO: 25015099, 25201977, 25489054, 30762474, 28637794, 31550518, 33402679<text:s/></text:p>
      <text:p text:style-name="Standard"><text:span text:style-name="T30">🧩</text:span><text:span text:style-name="T31"><text:s/>Wissenschaftliche Bedeutung</text:span></text:p>
      <text:list text:style-name="LFO3" text:continue-numbering="true">
        <text:list-item>
          <text:p text:style-name="P32">Einer der<text:s/><text:span text:style-name="T33">zentralen Datensätze</text:span><text:s/>für T2D‑bezogene Genexpressionsforschung</text:p>
        </text:list-item>
        <text:list-item>
          <text:p text:style-name="P34">Enthält<text:s/><text:span text:style-name="T35">kontinuierliche metabolische Parameter (HbA1c)</text:span></text:p>
        </text:list-item>
        <text:list-item>
          <text:p text:style-name="P36">Ideal für:</text:p>
          <text:list text:continue-numbering="true">
            <text:list-item>
              <text:p text:style-name="P37">Regressionsmodelle</text:p>
            </text:list-item>
            <text:list-item>
              <text:p text:style-name="P38">Differential Expression</text:p>
            </text:list-item>
            <text:list-item>
              <text:p text:style-name="P39">Pathway‑Analysen</text:p>
            </text:list-item>
            <text:list-item>
              <text:p text:style-name="P40">Meta‑Analysen mit anderen GPL6244‑Datensätz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 w</meta:initial-creator>
    <dc:creator>ch w</dc:creator>
    <meta:creation-date>2026-05-28T15:43:00Z</meta:creation-date>
    <dc:date>2026-05-28T15:44:00Z</dc:date>
    <meta:template xlink:href="Normal" xlink:type="simple"/>
    <meta:editing-cycles>1</meta:editing-cycles>
    <meta:editing-duration>PT0S</meta:editing-duration>
    <meta:document-statistic meta:page-count="1" meta:paragraph-count="2" meta:word-count="169" meta:character-count="1233" meta:row-count="8" meta:non-whitespace-character-count="1066"/>
  </office:meta>
</office:document-meta>
</file>